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3" table:number-columns-repeated="4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hell Sort</text:p>
          </table:table-cell>
          <table:covered-table-cell table:number-columns-repeated="4" table:style-name="ce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style-name="ce2" office:value-type="string" calcext:value-type="string">
            <text:p>Arquiv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Tempo (ms)</text:p>
          </table:table-cell>
          <table:table-cell table:style-name="ce6" office:value-type="string" calcext:value-type="string">
            <text:p>Comparações</text:p>
          </table:table-cell>
          <table:table-cell table:style-name="ce6" office:value-type="string" calcext:value-type="string">
            <text:p>Troca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dos5.tx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,011 m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.tx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,058 ms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399" calcext:value-type="float">
            <text:p>39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.txt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,121 ms</text:p>
          </table:table-cell>
          <table:table-cell table:style-name="ce8" office:value-type="float" office:value="14195" calcext:value-type="float">
            <text:p>14195</text:p>
          </table:table-cell>
          <table:table-cell table:style-name="ce8" office:value-type="float" office:value="9162" calcext:value-type="float">
            <text:p>916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0.tx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6,264 ms</text:p>
          </table:table-cell>
          <table:table-cell table:style-name="ce8" office:value-type="float" office:value="241773" calcext:value-type="float">
            <text:p>241773</text:p>
          </table:table-cell>
          <table:table-cell table:style-name="ce8" office:value-type="float" office:value="170954" calcext:value-type="float">
            <text:p>170954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00.txt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string" calcext:value-type="string">
            <text:p>15,763 ms</text:p>
          </table:table-cell>
          <table:table-cell table:style-name="ce8" office:value-type="float" office:value="1680225" calcext:value-type="float">
            <text:p>1680225</text:p>
          </table:table-cell>
          <table:table-cell table:style-name="ce8" office:value-type="float" office:value="1247305" calcext:value-type="float">
            <text:p>1247305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100mil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27,250 ms</text:p>
          </table:table-cell>
          <table:table-cell table:style-name="ce8" office:value-type="float" office:value="3771887" calcext:value-type="float">
            <text:p>3771887</text:p>
          </table:table-cell>
          <table:table-cell table:style-name="ce8" office:value-type="float" office:value="2846311" calcext:value-type="float">
            <text:p>2846311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mil.txt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8" office:value-type="string" calcext:value-type="string">
            <text:p>105,773 ms</text:p>
          </table:table-cell>
          <table:table-cell table:style-name="ce8" office:value-type="float" office:value="25315660" calcext:value-type="float">
            <text:p>25315660</text:p>
          </table:table-cell>
          <table:table-cell table:style-name="ce8" office:value-type="float" office:value="19951339" calcext:value-type="float">
            <text:p>19951339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2" table:number-rows-repeated="3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style-name="ce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6"/>
          <table:table-cell table:style-name="ce4"/>
          <table:table-cell table:number-columns-repeated="3"/>
          <table:table-cell table:style-name="ce8"/>
        </table:table-row>
        <table:table-row table:style-name="ro2">
          <table:table-cell table:number-columns-repeated="6"/>
          <table:table-cell table:style-name="ce4"/>
          <table:table-cell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7:51:10.8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1T09:42:56.604654700</meta:creation-date>
    <dc:date>2026-05-16T18:01:53.341000000</dc:date>
    <meta:editing-duration>PT4H17M22S</meta:editing-duration>
    <meta:editing-cycles>5</meta:editing-cycles>
    <meta:generator>LibreOffice/7.6.2.1$Windows_X86_64 LibreOffice_project/56f7684011345957bbf33a7ee678afaf4d2ba333</meta:generator>
    <meta:document-statistic meta:table-count="1" meta:cell-count="41" meta:object-count="0"/>
  </office:meta>
</office:document-meta>
</file>